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text-properties fo:font-size="24pt" fo:font-weight="bold" officeooo:rsid="000226fa" officeooo:paragraph-rsid="000226fa" style:font-weight-asian="bold" style:font-weight-complex="bold"/>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paragraph-properties fo:break-before="page"/>
      <style:text-properties officeooo:paragraph-rsid="000226fa"/>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0"/>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T1" style:family="text">
      <style:text-properties fo:font-size="24pt" fo:font-weight="bold" officeooo:rsid="000226fa" style:font-weight-asian="bold" style:font-weight-complex="bold"/>
    </style:style>
    <style:style style:name="T2" style:family="text">
      <style:text-properties fo:font-size="24pt" officeooo:rsid="000226fa"/>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Đây là bài giới thiệu về Cơ sở dữ liệu (Database) từ khóa học của Đại học Stanford.</text:p>
      <text:p text:style-name="P8">BÀI 1</text:p>
      <text:p text:style-name="Text_20_body"><text:span text:style-name="Strong_20_Emphasis">Hệ quản trị cơ sở dữ liệu (DBMS) cung cấp:</text:span> Khả năng lưu trữ và truy xuất hiệu quả, đáng tin cậy, tiện lợi và an toàn cho nhiều người dùng đối với lượng dữ liệu khổng lồ và lâu dài.</text:p>
      <text:p text:style-name="Text_20_body"><text:span text:style-name="Strong_20_Emphasis">7 đặc điểm quan trọng:</text:span></text:p>
      <text:list text:style-name="L1">
        <text:list-item>
          <text:p text:style-name="P3"><text:span text:style-name="Strong_20_Emphasis">Massive (Khổng lồ)</text:span>: Xử lý hàng terabyte dữ liệu, vượt quá bộ nhớ máy tính </text:p>
        </text:list-item>
        <text:list-item>
          <text:p text:style-name="P3"><text:span text:style-name="Strong_20_Emphasis">Persistent (Lâu dài)</text:span>: Dữ liệu tồn tại lâu hơn các chương trình xử lý nó </text:p>
        </text:list-item>
        <text:list-item>
          <text:p text:style-name="P3"><text:span text:style-name="Strong_20_Emphasis">Safe (An toàn)</text:span>: Đảm bảo tính nhất quán dù có lỗi phần cứng, phần mềm hay người dùng xấu </text:p>
        </text:list-item>
        <text:list-item>
          <text:p text:style-name="P3"><text:span text:style-name="Strong_20_Emphasis">Multi-user (Đa người dùng)</text:span>: Nhiều người dùng truy cập đồng thời nhờ cơ chế kiểm soát đồng thời </text:p>
        </text:list-item>
        <text:list-item>
          <text:p text:style-name="P3"><text:span text:style-name="Strong_20_Emphasis">Convenient (Tiện lợi)</text:span>: Độc lập dữ liệu vật lý, ngôn ngữ truy vấn cấp cao dạng khai báo </text:p>
        </text:list-item>
        <text:list-item>
          <text:p text:style-name="P3"><text:span text:style-name="Strong_20_Emphasis">Efficient (Hiệu quả)</text:span>: Xử lý hàng nghìn truy vấn phức tạp mỗi giây </text:p>
        </text:list-item>
        <text:list-item>
          <text:p text:style-name="P2"><text:span text:style-name="Strong_20_Emphasis">Reliable (Đáng tin cậy)</text:span>: Đảm bảo hoạt động 99.99999% thời gian </text:p>
        </text:list-item>
      </text:list>
      <text:p text:style-name="Text_20_body"><text:span text:style-name="Strong_20_Emphasis">4 khái niệm chính:</text:span></text:p>
      <text:list text:style-name="L2">
        <text:list-item>
          <text:p text:style-name="P5"><text:span text:style-name="Strong_20_Emphasis">Data model</text:span>: Cách cấu trúc dữ liệu (relational, XML, graph) </text:p>
        </text:list-item>
        <text:list-item>
          <text:p text:style-name="P5"><text:span text:style-name="Strong_20_Emphasis">Schema vs Data</text:span>: Schema như "kiểu dữ liệu", data như "biến" </text:p>
        </text:list-item>
        <text:list-item>
          <text:p text:style-name="P5"><text:span text:style-name="Strong_20_Emphasis">Data Definition Language</text:span>: Thiết lập cấu trúc database </text:p>
        </text:list-item>
        <text:list-item>
          <text:p text:style-name="P4"><text:span text:style-name="Strong_20_Emphasis">Data Manipulation Language</text:span>: Truy vấn và chỉnh sửa dữ liệu </text:p>
        </text:list-item>
      </text:list>
      <text:p text:style-name="Text_20_body"><text:span text:style-name="Strong_20_Emphasis">Các vai trò:</text:span></text:p>
      <text:list text:style-name="L3">
        <text:list-item>
          <text:p text:style-name="P7">Database Designer: Thiết kế schema </text:p>
        </text:list-item>
        <text:list-item>
          <text:p text:style-name="P7">Application Developer: Xây dựng ứng dụng </text:p>
        </text:list-item>
        <text:list-item>
          <text:p text:style-name="P6">Database Administrator: Quản lý và tối ưu hệ thống </text:p>
        </text:list-item>
      </text:list>
      <text:p text:style-name="Text_20_body"><text:line-break/></text:p>
      <text:p text:style-name="P13"><text:span text:style-name="T1">BÀI 2: </text:span><text:span text:style-name="Strong_20_Emphasis"><text:span text:style-name="T2">Mô hình Quan hệ (Relational Model)</text:span></text:span><text:span text:style-name="T1"> trong cơ sở dữ liệu.</text:span></text:p>
      <text:p text:style-name="Text_20_body"><text:span text:style-name="Strong_20_Emphasis">Giới thiệu Mô hình Quan hệ:</text:span></text:p>
      <text:list text:style-name="L4">
        <text:list-item>
          <text:p text:style-name="P10">Ra đời hơn 35 năm, là nền tảng của các hệ CSDL hiện đại </text:p>
        </text:list-item>
        <text:list-item>
          <text:p text:style-name="P10">Cực kỳ đơn giản nhưng mạnh mẽ </text:p>
        </text:list-item>
        <text:list-item>
          <text:p text:style-name="P10">Có ngôn ngữ truy vấn cấp cao và triển khai rất hiệu quả </text:p>
        </text:list-item>
        <text:list-item>
          <text:p text:style-name="P9">Được sử dụng bởi tất cả các hệ CSDL thương mại </text:p>
        </text:list-item>
      </text:list>
      <text:p text:style-name="Text_20_body"><text:span text:style-name="Strong_20_Emphasis">Các khái niệm cơ bản:</text:span></text:p>
      <text:list text:style-name="L5">
        <text:list-item>
          <text:p text:style-name="P11"><text:span text:style-name="Strong_20_Emphasis">Relation (Bảng/Table)</text:span></text:p>
          <text:list>
            <text:list-item>
              <text:p text:style-name="P12">CSDL gồm nhiều relation, mỗi relation có tên </text:p>
            </text:list-item>
            <text:list-item>
              <text:p text:style-name="P12">Ví dụ: bảng Student, bảng College </text:p>
            </text:list-item>
          </text:list>
        </text:list-item>
        <text:list-item>
          <text:p text:style-name="P11"><text:span text:style-name="Strong_20_Emphasis">Attributes (Thuộc tính/Cột)</text:span></text:p>
          <text:list>
            <text:list-item>
              <text:p text:style-name="P12">Mỗi relation có tập thuộc tính định trước </text:p>
            </text:list-item>
            <text:list-item>
              <text:p text:style-name="P12">Student: ID, Name, GPA, Photo </text:p>
            </text:list-item>
            <text:list-item>
              <text:p text:style-name="P12">College: Name, State, Enrollment </text:p>
            </text:list-item>
          </text:list>
        </text:list-item>
        <text:list-item>
          <text:p text:style-name="P11"><text:span text:style-name="Strong_20_Emphasis">Tuples (Bộ/Hàng)</text:span></text:p>
          <text:list>
            <text:list-item>
              <text:p text:style-name="P12">Dữ liệu thực tế được lưu trong các hàng </text:p>
            </text:list-item>
            <text:list-item>
              <text:p text:style-name="P12">Mỗi hàng chứa giá trị cho từng thuộc tính </text:p>
            </text:list-item>
            <text:list-item>
              <text:p text:style-name="P12">Ví dụ: (123, Amy, 3.9, 😊) </text:p>
            </text:list-item>
          </text:list>
        </text:list-item>
        <text:list-item>
          <text:p text:style-name="P11"><text:span text:style-name="Strong_20_Emphasis">Types/Domain (Kiểu dữ liệu)</text:span></text:p>
          <text:list>
            <text:list-item>
              <text:p text:style-name="P12">Mỗi thuộc tính có kiểu: integer, string, float, jpeg </text:p>
            </text:list-item>
            <text:list-item>
              <text:p text:style-name="P12">Có thể có kiểu liệt kê (như 50 bang của Mỹ) </text:p>
            </text:list-item>
          </text:list>
        </text:list-item>
        <text:list-item>
          <text:p text:style-name="P11"><text:span text:style-name="Strong_20_Emphasis">Schema vs Instance</text:span></text:p>
          <text:list>
            <text:list-item>
              <text:p text:style-name="P12"><text:span text:style-name="Strong_20_Emphasis">Schema</text:span>: Cấu trúc của relation (tên bảng, thuộc tính, kiểu) </text:p>
            </text:list-item>
            <text:list-item>
              <text:p text:style-name="P12"><text:span text:style-name="Strong_20_Emphasis">Instance</text:span>: Nội dung thực tế tại một thời điểm </text:p>
            </text:list-item>
          </text:list>
        </text:list-item>
        <text:list-item>
          <text:p text:style-name="P11"><text:span text:style-name="Strong_20_Emphasis">Null Values</text:span></text:p>
          <text:list>
            <text:list-item>
              <text:p text:style-name="P12">Giá trị đặc biệt biểu thị "không xác định" hoặc "không biết" </text:p>
            </text:list-item>
            <text:list-item>
              <text:p text:style-name="P12">Cần thận trọng khi truy vấn với null </text:p>
            </text:list-item>
            <text:list-item>
              <text:p text:style-name="P12">Ví dụ: GPA &gt; 3.5 OR GPA ≤ 3.5 không trả về tuple có GPA = null </text:p>
            </text:list-item>
          </text:list>
        </text:list-item>
        <text:list-item>
          <text:p text:style-name="P11"><text:span text:style-name="Strong_20_Emphasis">Key (Khóa)</text:span></text:p>
          <text:list>
            <text:list-item>
              <text:p text:style-name="P12">Thuộc tính có giá trị duy nhất cho mỗi tuple </text:p>
            </text:list-item>
            <text:list-item>
              <text:p text:style-name="P12">Student: ID là key </text:p>
            </text:list-item>
            <text:list-item>
              <text:p text:style-name="P12">College: (Name, State) là key kết hợp </text:p>
            </text:list-item>
            <text:list-item>
              <text:p text:style-name="P11"><text:span text:style-name="Strong_20_Emphasis">Ứng dụng</text:span>: Định danh tuple, tạo index để truy xuất nhanh, tham chiếu giữa các bảng </text:p>
            </text:list-item>
          </text:list>
        </text:list-item>
      </text:list>
      <text:p text:style-name="Text_20_body"><text:span text:style-name="Strong_20_Emphasis">Tạo bảng trong SQL:</text:span></text:p>
      <text:p text:style-name="Preformatted_20_Text"><text:span text:style-name="Source_20_Text">CREATE TABLE Student(ID, Name, GPA, Photo)</text:span></text:p>
      <text:p text:style-name="Preformatted_20_Text"><text:span text:style-name="Source_20_Text">-- Hoặc có kiểu dữ liệu:</text:span></text:p>
      <text:p text:style-name="P1"><text:span text:style-name="Source_20_Text">CREATE TABLE Student(ID INT, Name VARCHAR, GPA FLOAT, Photo JPEG)</text:span></text:p>
      <text:p text:style-name="P13"><text:span text:style-name="T1">BÀI 3:</text:span><text:span text:style-name="Strong_20_Emphasis">Truy vấn Cơ sở dữ liệu Quan hệ (Querying Relational Databases)</text:span></text:p>
      <text:p text:style-name="Text_20_body"><text:span text:style-name="Strong_20_Emphasis">Các bước tạo và sử dụng CSDL quan hệ:</text:span></text:p>
      <text:list text:style-name="L6">
        <text:list-item>
          <text:p text:style-name="P15"><text:span text:style-name="Strong_20_Emphasis">Thiết kế Schema</text:span> → Tạo schema bằng DDL (Data Definition Language) </text:p>
        </text:list-item>
        <text:list-item>
          <text:p text:style-name="P15"><text:span text:style-name="Strong_20_Emphasis">Load dữ liệu ban đầu</text:span> → Nạp dữ liệu từ nguồn bên ngoài (files) </text:p>
        </text:list-item>
        <text:list-item>
          <text:p text:style-name="P15"><text:span text:style-name="Strong_20_Emphasis">Truy vấn và chỉnh sửa dữ liệu</text:span> → Hoạt động liên tục trong suốt vòng đời CSDL </text:p>
          <text:list>
            <text:list-item>
              <text:p text:style-name="P15">Người dùng đặt câu hỏi (Q1, Q2...) → Nhận câu trả lời </text:p>
            </text:list-item>
            <text:list-item>
              <text:p text:style-name="P14">Chỉnh sửa: insert, update → Nhận xác nhận </text:p>
            </text:list-item>
          </text:list>
        </text:list-item>
      </text:list>
      <text:p text:style-name="Text_20_body"><text:span text:style-name="Strong_20_Emphasis">Đặc điểm truy vấn CSDL quan hệ:</text:span></text:p>
      <text:list text:style-name="L7">
        <text:list-item>
          <text:p text:style-name="P17"><text:span text:style-name="Strong_20_Emphasis">Ad hoc queries</text:span>: Đặt câu hỏi không cần nghĩ trước, không cần viết chương trình dài </text:p>
        </text:list-item>
        <text:list-item>
          <text:p text:style-name="P16"><text:span text:style-name="Strong_20_Emphasis">Ngôn ngữ cấp cao</text:span>: Viết truy vấn phức tạp một cách ngắn gọn, không cần mô tả thuật toán </text:p>
        </text:list-item>
      </text:list>
      <text:p text:style-name="Text_20_body"><text:span text:style-name="Strong_20_Emphasis">Ví dụ truy vấn:</text:span></text:p>
      <text:list text:style-name="L8">
        <text:list-item>
          <text:p text:style-name="P19">Tìm sinh viên có GPA &gt; 3.7 nộp đơn vào Stanford và MIT </text:p>
        </text:list-item>
        <text:list-item>
          <text:p text:style-name="P19">Tìm khoa kỹ thuật ở California có &lt; 500 đơn ứng tuyển </text:p>
        </text:list-item>
        <text:list-item>
          <text:p text:style-name="P18">Tìm trường có tỷ lệ chấp nhận trung bình cao nhất trong 5 năm </text:p>
        </text:list-item>
      </text:list>
      <text:p text:style-name="Text_20_body">→ Tất cả có thể viết trong vài dòng SQL hoặc biểu thức đại số quan hệ đơn giản</text:p>
      <text:p text:style-name="Text_20_body"><text:span text:style-name="Strong_20_Emphasis">Thuật ngữ quan trọng:</text:span></text:p>
      <text:list text:style-name="L9">
        <text:list-item>
          <text:p text:style-name="P21"><text:span text:style-name="Strong_20_Emphasis">Query Language = DML</text:span> (Data Manipulation Language): bao gồm truy vấn và chỉnh sửa </text:p>
        </text:list-item>
        <text:list-item>
          <text:p text:style-name="P21"><text:span text:style-name="Strong_20_Emphasis">Closure</text:span>: Kết quả truy vấn cũng là một relation → có thể truy vấn tiếp trên kết quả </text:p>
        </text:list-item>
        <text:list-item>
          <text:p text:style-name="P20"><text:span text:style-name="Strong_20_Emphasis">Compositionality</text:span>: Chạy truy vấn trên kết quả của truy vấn trước </text:p>
        </text:list-item>
      </text:list>
      <text:p text:style-name="Text_20_body"><text:span text:style-name="Strong_20_Emphasis">Hai ngôn ngữ truy vấn chính:</text:span></text:p>
      <text:list text:style-name="L10">
        <text:list-item>
          <text:p text:style-name="P22"><text:span text:style-name="Strong_20_Emphasis">Relational Algebra (Đại số Quan hệ)</text:span></text:p>
          <text:list>
            <text:list-item>
              <text:p text:style-name="P23">Ngôn ngữ hình thức, có nền tảng lý thuyết vững chắc </text:p>
            </text:list-item>
            <text:list-item>
              <text:p text:style-name="P23">Dùng ký hiệu Hy Lạp (Phi Φ, Sigma σ) </text:p>
            </text:list-item>
            <text:list-item>
              <text:p text:style-name="P23">Ví dụ: <text:span text:style-name="Source_20_Text">Φ_ID(σ_GPA&gt;3.7 ∧ college='Stanford'(Student ⋈ Apply))</text:span> </text:p>
            </text:list-item>
          </text:list>
        </text:list-item>
        <text:list-item>
          <text:p text:style-name="P22"><text:span text:style-name="Strong_20_Emphasis">SQL</text:span></text:p>
          <text:list>
            <text:list-item>
              <text:p text:style-name="P23">Ngôn ngữ thực tế, chạy trên hệ CSDL thực </text:p>
            </text:list-item>
            <text:list-item>
              <text:p text:style-name="P23">Có nền tảng từ đại số quan hệ </text:p>
            </text:list-item>
            <text:list-item>
              <text:p text:style-name="P22">Ví dụ tương đương query trên bằng SQL </text:p>
            </text:list-item>
          </text:list>
        </text:list-item>
      </text:list>
      <text:p text:style-name="Text_20_body"><text:span text:style-name="Strong_20_Emphasis">Khuyến nghị học tập:</text:span></text:p>
      <text:list text:style-name="L11">
        <text:list-item>
          <text:p text:style-name="P25">Nên học Relational Algebra trước để hiểu nền tảng </text:p>
        </text:list-item>
        <text:list-item>
          <text:p text:style-name="P24">Có thể nhảy thẳng sang SQL nếu cần nhanh, nhưng mất đi sự hiểu biết sâu sắc </text:p>
        </text:list-item>
      </text:lis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7T15:29:33.159515027</meta:creation-date>
    <dc:date>2025-12-27T15:41:21.161048144</dc:date>
    <meta:editing-duration>PT1M28S</meta:editing-duration>
    <meta:editing-cycles>1</meta:editing-cycles>
    <meta:document-statistic meta:table-count="0" meta:image-count="0" meta:object-count="0" meta:page-count="3" meta:paragraph-count="89" meta:word-count="918" meta:character-count="4314" meta:non-whitespace-character-count="3492"/>
    <meta:generator>LibreOffice/24.2.7.2$Linux_X86_64 LibreOffice_project/420$Build-2</meta:generator>
  </office:meta>
</office:document-meta>
</file>